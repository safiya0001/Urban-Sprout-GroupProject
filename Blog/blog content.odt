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18pt" style:font-size-asian="18pt" style:font-size-complex="18pt"/>
    </style:style>
    <style:style style:name="P2" style:family="paragraph" style:parent-style-name="Standard" style:list-style-name="L1">
      <style:text-properties fo:font-size="13pt" style:font-size-asian="13pt" style:font-size-complex="13pt"/>
    </style:style>
    <style:style style:name="P3" style:family="paragraph" style:parent-style-name="Standard">
      <style:text-properties fo:font-size="13pt" style:font-size-asian="13pt" style:font-size-complex="13pt"/>
    </style:style>
    <style:style style:name="P4" style:family="paragraph" style:parent-style-name="Standard">
      <style:text-properties fo:font-size="13pt" officeooo:rsid="00215bef" officeooo:paragraph-rsid="00215bef" style:font-size-asian="13pt" style:font-size-complex="13pt"/>
    </style:style>
    <style:style style:name="P5" style:family="paragraph" style:parent-style-name="Standard">
      <style:text-properties officeooo:paragraph-rsid="0020a20d"/>
    </style:style>
    <style:style style:name="P6" style:family="paragraph" style:parent-style-name="Standard">
      <style:text-properties fo:font-weight="bold" officeooo:rsid="00233b46" officeooo:paragraph-rsid="00233b46" style:font-weight-asian="bold" style:font-weight-complex="bold"/>
    </style:style>
    <style:style style:name="P7" style:family="paragraph" style:parent-style-name="Standard">
      <style:text-properties officeooo:paragraph-rsid="0020eaef"/>
    </style:style>
    <style:style style:name="P8" style:family="paragraph" style:parent-style-name="Standard">
      <style:text-properties officeooo:paragraph-rsid="00215bef"/>
    </style:style>
    <style:style style:name="P9" style:family="paragraph" style:parent-style-name="Standard" style:list-style-name="L2">
      <style:text-properties officeooo:paragraph-rsid="001de8d1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4">
      <style:paragraph-properties fo:margin-top="0cm" fo:margin-bottom="0cm" style:contextual-spacing="false"/>
    </style:style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>
      <style:paragraph-properties fo:margin-top="0cm" fo:margin-bottom="0cm" style:contextual-spacing="false"/>
    </style:style>
    <style:style style:name="P18" style:family="paragraph" style:parent-style-name="Text_20_body" style:list-style-name="L10">
      <style:paragraph-properties fo:margin-top="0cm" fo:margin-bottom="0cm" style:contextual-spacing="false"/>
    </style:style>
    <style:style style:name="P19" style:family="paragraph" style:parent-style-name="Text_20_body" style:list-style-name="L11">
      <style:paragraph-properties fo:margin-top="0cm" fo:margin-bottom="0cm" style:contextual-spacing="false"/>
    </style:style>
    <style:style style:name="P20" style:family="paragraph" style:parent-style-name="Text_20_body" style:list-style-name="L12"/>
    <style:style style:name="P21" style:family="paragraph" style:parent-style-name="Standard" style:list-style-name="L13"/>
    <style:style style:name="P22" style:family="paragraph" style:parent-style-name="Text_20_body">
      <style:text-properties officeooo:rsid="00266c2f" officeooo:paragraph-rsid="00266c2f"/>
    </style:style>
    <style:style style:name="P23" style:family="paragraph" style:parent-style-name="Text_20_body" style:list-style-name="L14">
      <style:paragraph-properties fo:margin-top="0cm" fo:margin-bottom="0cm" style:contextual-spacing="false"/>
    </style:style>
    <style:style style:name="P24" style:family="paragraph" style:parent-style-name="Text_20_body" style:list-style-name="L14"/>
    <style:style style:name="P25" style:family="paragraph" style:parent-style-name="Text_20_body" style:list-style-name="L15">
      <style:paragraph-properties fo:margin-top="0cm" fo:margin-bottom="0cm" style:contextual-spacing="false"/>
    </style:style>
    <style:style style:name="P26" style:family="paragraph" style:parent-style-name="Text_20_body" style:list-style-name="L15"/>
    <style:style style:name="P27" style:family="paragraph" style:parent-style-name="Text_20_body" style:list-style-name="L16">
      <style:paragraph-properties fo:margin-top="0cm" fo:margin-bottom="0cm" style:contextual-spacing="false"/>
    </style:style>
    <style:style style:name="P28" style:family="paragraph" style:parent-style-name="Text_20_body" style:list-style-name="L16"/>
    <style:style style:name="P29" style:family="paragraph" style:parent-style-name="Text_20_body" style:list-style-name="L17">
      <style:paragraph-properties fo:margin-top="0cm" fo:margin-bottom="0cm" style:contextual-spacing="false"/>
    </style:style>
    <style:style style:name="P30" style:family="paragraph" style:parent-style-name="Text_20_body" style:list-style-name="L17"/>
    <style:style style:name="P31" style:family="paragraph" style:parent-style-name="Text_20_body" style:list-style-name="L18">
      <style:paragraph-properties fo:margin-top="0cm" fo:margin-bottom="0cm" style:contextual-spacing="false"/>
    </style:style>
    <style:style style:name="P32" style:family="paragraph" style:parent-style-name="Text_20_body" style:list-style-name="L18"/>
    <style:style style:name="P33" style:family="paragraph" style:parent-style-name="Heading_20_2">
      <style:text-properties officeooo:paragraph-rsid="002a84d5"/>
    </style:style>
    <style:style style:name="P34" style:family="paragraph" style:parent-style-name="Heading_20_3">
      <style:paragraph-properties fo:margin-top="0cm" fo:margin-bottom="0.247cm" style:contextual-spacing="false" fo:line-height="115%"/>
    </style:style>
    <style:style style:name="P35" style:family="paragraph" style:parent-style-name="Horizontal_20_Line">
      <style:paragraph-properties fo:margin-top="0cm" fo:margin-bottom="0.247cm" style:contextual-spacing="false" fo:line-height="115%"/>
    </style:style>
    <style:style style:name="P36" style:family="paragraph" style:parent-style-name="Heading_20_2">
      <style:paragraph-properties fo:margin-top="0cm" fo:margin-bottom="0.247cm" style:contextual-spacing="false" fo:line-height="115%"/>
    </style:style>
    <style:style style:name="P37" style:family="paragraph" style:parent-style-name="Text_20_body" style:list-style-name="L19">
      <style:paragraph-properties fo:margin-top="0cm" fo:margin-bottom="0cm" style:contextual-spacing="false"/>
    </style:style>
    <style:style style:name="P38" style:family="paragraph" style:parent-style-name="Text_20_body" style:list-style-name="L19"/>
    <style:style style:name="P39" style:family="paragraph" style:parent-style-name="Text_20_body" style:list-style-name="L20">
      <style:paragraph-properties fo:margin-top="0cm" fo:margin-bottom="0cm" style:contextual-spacing="false"/>
    </style:style>
    <style:style style:name="P40" style:family="paragraph" style:parent-style-name="Text_20_body" style:list-style-name="L20"/>
    <style:style style:name="P41" style:family="paragraph" style:parent-style-name="Text_20_body" style:list-style-name="L21">
      <style:paragraph-properties fo:margin-top="0cm" fo:margin-bottom="0cm" style:contextual-spacing="false"/>
    </style:style>
    <style:style style:name="P42" style:family="paragraph" style:parent-style-name="Text_20_body" style:list-style-name="L21"/>
    <style:style style:name="P43" style:family="paragraph" style:parent-style-name="Text_20_body" style:list-style-name="L22">
      <style:paragraph-properties fo:margin-top="0cm" fo:margin-bottom="0cm" style:contextual-spacing="false"/>
    </style:style>
    <style:style style:name="P44" style:family="paragraph" style:parent-style-name="Text_20_body" style:list-style-name="L22"/>
    <style:style style:name="P45" style:family="paragraph" style:parent-style-name="Text_20_body" style:list-style-name="L23">
      <style:paragraph-properties fo:margin-top="0cm" fo:margin-bottom="0cm" style:contextual-spacing="false"/>
    </style:style>
    <style:style style:name="P46" style:family="paragraph" style:parent-style-name="Text_20_body" style:list-style-name="L23"/>
    <style:style style:name="P47" style:family="paragraph" style:parent-style-name="Text_20_body" style:list-style-name="L24">
      <style:paragraph-properties fo:margin-top="0cm" fo:margin-bottom="0cm" style:contextual-spacing="false"/>
    </style:style>
    <style:style style:name="P48" style:family="paragraph" style:parent-style-name="Text_20_body" style:list-style-name="L24"/>
    <style:style style:name="P49" style:family="paragraph" style:parent-style-name="Text_20_body" style:list-style-name="L25">
      <style:paragraph-properties fo:margin-top="0cm" fo:margin-bottom="0cm" style:contextual-spacing="false"/>
    </style:style>
    <style:style style:name="P50" style:family="paragraph" style:parent-style-name="Text_20_body" style:list-style-name="L25"/>
    <style:style style:name="P51" style:family="paragraph" style:parent-style-name="Text_20_body" style:list-style-name="L26">
      <style:paragraph-properties fo:margin-top="0cm" fo:margin-bottom="0cm" style:contextual-spacing="false"/>
    </style:style>
    <style:style style:name="P52" style:family="paragraph" style:parent-style-name="Text_20_body" style:list-style-name="L26"/>
    <style:style style:name="P53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54" style:family="paragraph" style:parent-style-name="Text_20_body" style:list-style-name="L27">
      <style:paragraph-properties fo:margin-top="0cm" fo:margin-bottom="0cm" style:contextual-spacing="false"/>
    </style:style>
    <style:style style:name="P55" style:family="paragraph" style:parent-style-name="Text_20_body" style:list-style-name="L27"/>
    <style:style style:name="P56" style:family="paragraph" style:parent-style-name="Text_20_body" style:list-style-name="L28">
      <style:paragraph-properties fo:margin-top="0cm" fo:margin-bottom="0cm" style:contextual-spacing="false"/>
    </style:style>
    <style:style style:name="P57" style:family="paragraph" style:parent-style-name="Text_20_body" style:list-style-name="L28"/>
    <style:style style:name="P58" style:family="paragraph" style:parent-style-name="Text_20_body" style:list-style-name="L29">
      <style:paragraph-properties fo:margin-top="0cm" fo:margin-bottom="0cm" style:contextual-spacing="false"/>
    </style:style>
    <style:style style:name="P59" style:family="paragraph" style:parent-style-name="Text_20_body" style:list-style-name="L29"/>
    <style:style style:name="P60" style:family="paragraph" style:parent-style-name="Text_20_body" style:list-style-name="L30">
      <style:paragraph-properties fo:margin-top="0cm" fo:margin-bottom="0cm" style:contextual-spacing="false"/>
    </style:style>
    <style:style style:name="P61" style:family="paragraph" style:parent-style-name="Text_20_body" style:list-style-name="L30"/>
    <style:style style:name="P62" style:family="paragraph" style:parent-style-name="Text_20_body" style:list-style-name="L31">
      <style:paragraph-properties fo:margin-top="0cm" fo:margin-bottom="0cm" style:contextual-spacing="false"/>
    </style:style>
    <style:style style:name="P63" style:family="paragraph" style:parent-style-name="Text_20_body" style:list-style-name="L31"/>
    <style:style style:name="P64" style:family="paragraph" style:parent-style-name="Text_20_body" style:list-style-name="L32">
      <style:paragraph-properties fo:margin-top="0cm" fo:margin-bottom="0cm" style:contextual-spacing="false"/>
    </style:style>
    <style:style style:name="P65" style:family="paragraph" style:parent-style-name="Text_20_body" style:list-style-name="L32"/>
    <style:style style:name="P66" style:family="paragraph" style:parent-style-name="Text_20_body" style:list-style-name="L33">
      <style:paragraph-properties fo:margin-top="0cm" fo:margin-bottom="0cm" style:contextual-spacing="false"/>
    </style:style>
    <style:style style:name="P67" style:family="paragraph" style:parent-style-name="Text_20_body" style:list-style-name="L33"/>
    <style:style style:name="P68" style:family="paragraph" style:parent-style-name="Text_20_body" style:list-style-name="L34">
      <style:paragraph-properties fo:margin-top="0cm" fo:margin-bottom="0cm" style:contextual-spacing="false"/>
    </style:style>
    <style:style style:name="P69" style:family="paragraph" style:parent-style-name="Text_20_body" style:list-style-name="L34"/>
    <style:style style:name="P70" style:family="paragraph" style:parent-style-name="Text_20_body" style:list-style-name="L35">
      <style:paragraph-properties fo:margin-top="0cm" fo:margin-bottom="0cm" style:contextual-spacing="false"/>
    </style:style>
    <style:style style:name="P71" style:family="paragraph" style:parent-style-name="Text_20_body" style:list-style-name="L35"/>
    <style:style style:name="P72" style:family="paragraph" style:parent-style-name="Text_20_body" style:list-style-name="L36">
      <style:paragraph-properties fo:margin-top="0cm" fo:margin-bottom="0cm" style:contextual-spacing="false"/>
    </style:style>
    <style:style style:name="P73" style:family="paragraph" style:parent-style-name="Text_20_body" style:list-style-name="L36"/>
    <style:style style:name="P74" style:family="paragraph" style:parent-style-name="Standard">
      <style:text-properties officeooo:paragraph-rsid="0022695f"/>
    </style:style>
    <style:style style:name="P75" style:family="paragraph" style:parent-style-name="Standard">
      <style:text-properties fo:font-size="14pt" style:font-size-asian="14pt" style:font-size-complex="14pt"/>
    </style:style>
    <style:style style:name="P76" style:family="paragraph" style:parent-style-name="Standard" style:list-style-name="L37">
      <style:text-properties officeooo:paragraph-rsid="00233b46"/>
    </style:style>
    <style:style style:name="P77" style:family="paragraph" style:parent-style-name="Text_20_body">
      <style:text-properties fo:font-size="20pt" style:font-size-asian="20pt" style:font-size-complex="20pt"/>
    </style:style>
    <style:style style:name="P78" style:family="paragraph" style:parent-style-name="Heading_20_1">
      <style:text-properties fo:font-size="20pt" style:font-size-asian="20pt" style:font-size-complex="20pt"/>
    </style:style>
    <style:style style:name="P79" style:family="paragraph" style:parent-style-name="Heading_20_2">
      <style:text-properties fo:font-size="20pt" style:font-size-asian="20pt" style:font-size-complex="20pt"/>
    </style:style>
    <style:style style:name="P80" style:family="paragraph" style:parent-style-name="Standard">
      <style:text-properties fo:font-size="20pt" style:font-size-asian="20pt" style:font-size-complex="20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officeooo:rsid="0022695f"/>
    </style:style>
    <style:style style:name="T3" style:family="text">
      <style:text-properties officeooo:rsid="001fc2b6"/>
    </style:style>
    <style:style style:name="T4" style:family="text">
      <style:text-properties officeooo:rsid="0020a20d"/>
    </style:style>
    <style:style style:name="T5" style:family="text">
      <style:text-properties officeooo:rsid="0020eaef"/>
    </style:style>
    <style:style style:name="T6" style:family="text">
      <style:text-properties officeooo:rsid="00270557"/>
    </style:style>
    <style:style style:name="T7" style:family="text">
      <style:text-properties officeooo:rsid="001c1522"/>
    </style:style>
    <style:style style:name="T8" style:family="text">
      <style:text-properties officeooo:rsid="00215bef"/>
    </style:style>
    <style:style style:name="T9" style:family="text">
      <style:text-properties officeooo:rsid="0023e0f5"/>
    </style:style>
    <style:style style:name="T10" style:family="text">
      <style:text-properties officeooo:rsid="00266c2f"/>
    </style:style>
    <style:style style:name="T11" style:family="text">
      <style:text-properties fo:font-size="12pt" officeooo:rsid="002a84d5" style:font-size-asian="12pt" style:font-size-complex="12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270557" style:font-size-asian="12pt" style:font-size-complex="12pt"/>
    </style:style>
    <style:style style:name="T14" style:family="text">
      <style:text-properties fo:font-size="12pt" officeooo:rsid="00266c2f" style:font-size-asian="12pt" style:font-size-complex="12pt"/>
    </style:style>
    <style:style style:name="T15" style:family="text">
      <style:text-properties fo:font-size="12pt" officeooo:rsid="0023e0f5" style:font-size-asian="12pt" style:font-size-complex="12pt"/>
    </style:style>
    <style:style style:name="T16" style:family="text">
      <style:text-properties fo:font-size="13pt" officeooo:rsid="0023e0f5" style:font-size-asian="13pt" style:font-size-complex="13pt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font-size="14pt" officeooo:rsid="0023e0f5" style:font-size-asian="14pt" style:font-size-complex="14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5pt" officeooo:rsid="0023e0f5" style:font-size-asian="15pt" style:font-size-complex="15pt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font-size="20pt" style:font-size-asian="20pt" style:font-size-complex="20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/>BLOG SECTION </text:p>
      <text:h text:style-name="P1" text:outline-level="1" text:is-list-header="true">Our Blog</text:h>
      <text:list text:style-name="L1">
        <text:list-item>
          <text:p text:style-name="P2"><text:s/><text:span text:style-name="T1">About Technology in Urban Gardening</text:span></text:p>
        </text:list-item>
      </text:list>
      <text:p text:style-name="P3"/>
      <text:p text:style-name="P4">Eve<text:span text:style-name="T2">r</text:span> thought you needed a big backyard to grow you own food ?</text:p>
      <text:p text:style-name="P4">Not anymore.</text:p>
      <text:p text:style-name="P5"><text:span text:style-name="T3">As cities continue to expand with growth, traditional agriculture practices struggle to meet the increasing demand for fresh, </text:span><text:span text:style-name="T4">locally sourced produce. This challenge has paved the way for the concept of Urban Gardening.</text:span><text:span text:style-name="T3"> </text:span><text:span text:style-name="T4">Urban Gardening transform rooftops, kitchen space or balcony into thriving hubs of food production.</text:span></text:p>
      <text:p text:style-name="P5"/>
      <text:p text:style-name="P5"><text:span text:style-name="T4">However, the success of urban gardening is not solely</text:span> <text:span text:style-name="T4">dependent on physical space or soil. The true catalyst lies into the integration of technology, which has given birth of the concept of Smart farming, </text:span><text:span text:style-name="T5">which enhances efficiency and productivity in limited urban environment.</text:span></text:p>
      <text:p text:style-name="P5"/>
      <text:p text:style-name="P6">1.<text:span text:style-name="T6">1</text:span>.About Technology in Urban Gardening.</text:p>
      <text:p text:style-name="P7">Technology in urban gardening <text:span text:style-name="T5">plays crucial role by enabling </text:span>people <text:span text:style-name="T5">to </text:span>grow plants efficiently in small spaces using smart tools like automated watering systems, <text:span text:style-name="T3">IoT sensors</text:span><text:span text:style-name="T7"> </text:span><text:span text:style-name="T3">and soil- less growing methods </text:span><text:span text:style-name="T5">like </text:span><text:span text:style-name="T3">h</text:span><text:span text:style-name="T7">ydroponics </text:span><text:span text:style-name="T3">and aeroponics</text:span><text:span text:style-name="T7"> </text:span><text:span text:style-name="T3">s</text:span><text:span text:style-name="T7">ystem </text:span><text:span text:style-name="T5">that makes it possible to monitor and control plant growth conditions accurately.</text:span></text:p>
      <text:p text:style-name="P7"/>
      <text:p text:style-name="P8"><text:span text:style-name="T3">These technology enables vertically farming, </text:span><text:span text:style-name="T5">allowing multiple layers of crops to be grown in </text:span><text:span text:style-name="T8">small </text:span><text:span text:style-name="T5">areas. </text:span><text:span text:style-name="T8">With the help of AI</text:span><text:span text:style-name="T3"> and data, </text:span><text:span text:style-name="T8">gardeners can control</text:span><text:span text:style-name="T3"> light, </text:span><text:span text:style-name="T8">water</text:span><text:span text:style-name="T3"> and nutrient </text:span><text:span text:style-name="T5">levels </text:span><text:span text:style-name="T8">perfectly which </text:span><text:span text:style-name="T5">lead</text:span><text:span text:style-name="T8">s to</text:span><text:span text:style-name="T5"> </text:span><text:span text:style-name="T8">better</text:span><text:span text:style-name="T5"> yields and </text:span><text:span text:style-name="T8">healthier</text:span><text:span text:style-name="T5">.</text:span></text:p>
      <text:p text:style-name="P8"/>
      <text:p text:style-name="P8"><text:span text:style-name="T8">I</text:span>n a world where space is shrinking but demand for fresh food is rising, urban gardening powered by technology isn’t just a trend—it’s the future. </text:p>
      <text:list text:style-name="L2">
        <text:list-header>
          <text:p text:style-name="P9"/>
        </text:list-header>
      </text:list>
      <text:p text:style-name="Standard"/>
      <text:p text:style-name="Standard"/>
      <text:p text:style-name="P10"><text:span text:style-name="T6">1.</text:span>2. Positive Impact of Technology</text:p>
      <text:list text:style-name="L3">
        <text:list-item>
          <text:p text:style-name="P11">Efficient use of limited urban space through vertical farming </text:p>
        </text:list-item>
      </text:list>
      <text:list text:style-name="L4">
        <text:list-item>
          <text:p text:style-name="P12">Reduced water usage with hydroponic systems </text:p>
        </text:list-item>
      </text:list>
      <text:list text:style-name="L5">
        <text:list-item>
          <text:p text:style-name="P13">Faster and healthier plant growth </text:p>
        </text:list-item>
      </text:list>
      <text:list text:style-name="L6">
        <text:list-item>
          <text:p text:style-name="P14">Ability to grow crops year-round </text:p>
        </text:list-item>
      </text:list>
      <text:list text:style-name="L7">
        <text:list-item>
          <text:p text:style-name="P15">Real-time monitoring using smart sensors </text:p>
        </text:list-item>
      </text:list>
      <text:p text:style-name="Standard"/>
      <text:p text:style-name="P10"><text:s/><text:span text:style-name="T6">1.</text:span>3. Negative Impact of Technology</text:p>
      <text:p text:style-name="Standard"/>
      <text:list text:style-name="L8">
        <text:list-item>
          <text:p text:style-name="P16">High setup and maintenance costs </text:p>
        </text:list-item>
      </text:list>
      <text:list text:style-name="L9">
        <text:list-item>
          <text:p text:style-name="P17">Requires technical knowledge and skills </text:p>
        </text:list-item>
      </text:list>
      <text:list text:style-name="L10">
        <text:list-item>
          <text:p text:style-name="P18">Increased energy consumption </text:p>
        </text:list-item>
      </text:list>
      <text:list text:style-name="L11">
        <text:list-item>
          <text:p text:style-name="P19">Risk of system failures </text:p>
        </text:list-item>
      </text:list>
      <text:list text:style-name="L12">
        <text:list-item>
          <text:p text:style-name="P20">Limited accessibility for beginners </text:p>
        </text:list-item>
      </text:list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list text:style-name="L13">
        <text:list-header>
          <text:p text:style-name="P21"><text:span text:style-name="T9">2.</text:span> <text:span text:style-name="T1"><text:s/>How Technology Boosts Sustainable Gardening</text:span></text:p>
        </text:list-header>
      </text:list>
      <text:p text:style-name="Text_20_body">As environmental concerns continue to grow, sustainable gardening has become more important than ever. People are now looking for ways to grow plants while conserving water, reducing waste, and <text:span text:style-name="T10">minimizing the environment impact</text:span></text:p>
      <text:p text:style-name="Text_20_body">This is where technology plays a crucial role. Modern tools and smart systems are helping gardeners grow plants more efficiently while protecting natural resources.</text:p>
      <text:h text:style-name="Heading_20_2" text:outline-level="2"><text:span text:style-name="Strong_20_Emphasis"><text:span text:style-name="T11">2</text:span></text:span><text:span text:style-name="Strong_20_Emphasis"><text:span text:style-name="T12">.</text:span></text:span><text:span text:style-name="Strong_20_Emphasis"><text:span text:style-name="T13">1</text:span></text:span><text:span text:style-name="Strong_20_Emphasis"><text:span text:style-name="T12">. What is Sustainable Gardening?</text:span></text:span></text:h>
      <text:p text:style-name="Text_20_body">Sustainable gardening is a method of growing plants in a way that is environmentally friendly and resource-efficient. It focuses on reducing waste, conserving water, and maintaining soil health.</text:p>
      <text:p text:style-name="Text_20_body">With the help of technology, sustainable gardening has become easier and more effective—even in urban environments.</text:p>
      <text:p text:style-name="P22">Some of the ways to make Urban Gardening more Sustainable are:</text:p>
      <text:h text:style-name="Heading_20_2" text:outline-level="2"><text:span text:style-name="Strong_20_Emphasis"><text:span text:style-name="T11">2</text:span></text:span><text:span text:style-name="Strong_20_Emphasis"><text:span text:style-name="T14">.2</text:span></text:span><text:span text:style-name="Strong_20_Emphasis"><text:span text:style-name="T12">. Smart Water Management 💧</text:span></text:span></text:h>
      <text:p text:style-name="Text_20_body">Water is one of the most important resources in gardening, and technology helps use it wisely.</text:p>
      <text:list text:style-name="L14">
        <text:list-item>
          <text:p text:style-name="P23">Automated irrigation systems water plants only when needed </text:p>
        </text:list-item>
        <text:list-item>
          <text:p text:style-name="P23">Soil moisture sensors prevent overwatering </text:p>
        </text:list-item>
        <text:list-item>
          <text:p text:style-name="P24">Drip irrigation reduces water waste </text:p>
        </text:list-item>
      </text:list>
      <text:p text:style-name="Text_20_body"><text:span text:style-name="Strong_20_Emphasis">Result:</text:span> Significant water conservation and healthier plants</text:p>
      <text:h text:style-name="Heading_20_2" text:outline-level="2"><text:span text:style-name="Strong_20_Emphasis"><text:span text:style-name="T14">1</text:span></text:span><text:span text:style-name="Strong_20_Emphasis"><text:span text:style-name="T15">.</text:span></text:span><text:span text:style-name="Strong_20_Emphasis"><text:span text:style-name="T11">3</text:span></text:span><text:span text:style-name="Strong_20_Emphasis"><text:span text:style-name="T12">. Energy and Resource Optimization</text:span></text:span></text:h>
      <text:p text:style-name="Text_20_body">Modern gardening systems are designed to minimize waste.</text:p>
      <text:list text:style-name="L15">
        <text:list-item>
          <text:p text:style-name="P25">LED grow lights use less energy </text:p>
        </text:list-item>
        <text:list-item>
          <text:p text:style-name="P25">Renewable energy sources like solar panels power systems </text:p>
        </text:list-item>
        <text:list-item>
          <text:p text:style-name="P26">Automated systems reduce unnecessary resource use </text:p>
        </text:list-item>
      </text:list>
      <text:p text:style-name="Text_20_body"><text:span text:style-name="Strong_20_Emphasis">Result:</text:span> Lower environmental impact</text:p>
      <text:h text:style-name="Heading_20_2" text:outline-level="2"><text:span text:style-name="Strong_20_Emphasis"><text:span text:style-name="T16">4.Y</text:span></text:span><text:span text:style-name="Strong_20_Emphasis"><text:span text:style-name="T17">ear-Round Gardening</text:span></text:span></text:h>
      <text:p text:style-name="Text_20_body">Technology allows plants to grow regardless of weather conditions.</text:p>
      <text:list text:style-name="L16">
        <text:list-item>
          <text:p text:style-name="P27">Indoor gardening systems control temperature and light </text:p>
        </text:list-item>
        <text:list-item>
          <text:p text:style-name="P27">Hydroponics supports faster growth cycles </text:p>
        </text:list-item>
        <text:list-item>
          <text:p text:style-name="P28">Climate control ensures consistent production </text:p>
        </text:list-item>
      </text:list>
      <text:p text:style-name="Text_20_body"><text:span text:style-name="Strong_20_Emphasis">Result:</text:span> Continuous food supply throughout the year</text:p>
      <text:h text:style-name="Heading_20_2" text:outline-level="2"><text:soft-page-break/><text:span text:style-name="Strong_20_Emphasis"><text:span text:style-name="T15">5.</text:span></text:span><text:span text:style-name="Strong_20_Emphasis"><text:span text:style-name="T12"> Data-Driven Gardening 📊</text:span></text:span></text:h>
      <text:p text:style-name="Text_20_body">Smart gardening tools collect and analyze data to improve results.</text:p>
      <text:list text:style-name="L17">
        <text:list-item>
          <text:p text:style-name="P29">Track plant growth and health </text:p>
        </text:list-item>
        <text:list-item>
          <text:p text:style-name="P29">Monitor environmental conditions </text:p>
        </text:list-item>
        <text:list-item>
          <text:p text:style-name="P30">Make better decisions using real-time insights </text:p>
        </text:list-item>
      </text:list>
      <text:p text:style-name="Text_20_body"><text:span text:style-name="Strong_20_Emphasis">Result:</text:span> Higher efficiency and better yields</text:p>
      <text:h text:style-name="Heading_20_2" text:outline-level="2"><text:span text:style-name="Strong_20_Emphasis"><text:span text:style-name="T12">Challenges to Consider</text:span></text:span></text:h>
      <text:p text:style-name="Text_20_body">While technology improves sustainability, there are some limitations:</text:p>
      <text:list text:style-name="L18">
        <text:list-item>
          <text:p text:style-name="P31">High initial setup costs </text:p>
        </text:list-item>
        <text:list-item>
          <text:p text:style-name="P31">Dependence on electricity </text:p>
        </text:list-item>
        <text:list-item>
          <text:p text:style-name="P31">Technical knowledge required </text:p>
        </text:list-item>
        <text:list-item>
          <text:p text:style-name="P32">Maintenance of systems</text:p>
        </text:list-item>
      </text:list>
      <text:h text:style-name="Heading_20_2" text:outline-level="2"><text:span text:style-name="Strong_20_Emphasis"><text:span text:style-name="T12">Conclusion</text:span></text:span></text:h>
      <text:p text:style-name="Text_20_body">Technology is transforming sustainable gardening by making it more efficient, eco-friendly, and accessible. From saving water to reducing chemical use, smart gardening solutions help create a better balance between food production and environmental protection.</text:p>
      <text:p text:style-name="Text_20_body">As innovation continues, sustainable gardening powered by technology will play a vital role in building greener and more self-sufficient communities.</text:p>
      <text:p text:style-name="Text_20_body"/>
      <text:h text:style-name="P33" text:outline-level="2"><text:span text:style-name="Strong_20_Emphasis"><text:span text:style-name="T18">3. </text:span></text:span><text:span text:style-name="Strong_20_Emphasis"><text:span text:style-name="T19">Beginner Tips and Tricks for Urban Gardening</text:span></text:span></text:h>
      <text:h text:style-name="P34" text:outline-level="3"><text:span text:style-name="Strong_20_Emphasis">Introduction</text:span></text:h>
      <text:p text:style-name="Text_20_body">Urban gardening is becoming increasingly popular as more people look for ways to grow their own food in limited spaces. Whether you have a balcony, rooftop, or just a sunny window, you can start your gardening journey with minimal resources.</text:p>
      <text:p text:style-name="Text_20_body">If you're new to gardening, don’t worry—starting small and learning the basics is the key to success.</text:p>
      <text:p text:style-name="P35"/>
      <text:h text:style-name="P36" text:outline-level="2"><text:span text:style-name="Strong_20_Emphasis"><text:span text:style-name="T12">1. Start Small and Simple</text:span></text:span></text:h>
      <text:p text:style-name="Text_20_body">One of the biggest mistakes beginners make is trying to grow too many plants at once. Start with a few easy plants and expand gradually.</text:p>
      <text:p text:style-name="Text_20_body"><text:span text:style-name="Strong_20_Emphasis">Best beginner plants:</text:span></text:p>
      <text:list text:style-name="L19">
        <text:list-item>
          <text:p text:style-name="P37">Mint </text:p>
        </text:list-item>
        <text:list-item>
          <text:p text:style-name="P37">Basil </text:p>
        </text:list-item>
        <text:list-item>
          <text:p text:style-name="P37">Coriander </text:p>
        </text:list-item>
        <text:list-item>
          <text:p text:style-name="P37">Spinach </text:p>
        </text:list-item>
        <text:list-item>
          <text:p text:style-name="P38">Lettuce </text:p>
        </text:list-item>
      </text:list>
      <text:p text:style-name="Text_20_body"><text:soft-page-break/>These plants grow quickly and require less maintenance.</text:p>
      <text:p text:style-name="P35"/>
      <text:h text:style-name="P36" text:outline-level="2"><text:span text:style-name="Strong_20_Emphasis">2. Choose the Right Location</text:span></text:h>
      <text:p text:style-name="Text_20_body">Plants need proper sunlight to grow.</text:p>
      <text:list text:style-name="L20">
        <text:list-item>
          <text:p text:style-name="P39">Most plants require <text:span text:style-name="Strong_20_Emphasis">4–6 hours of sunlight daily</text:span> </text:p>
        </text:list-item>
        <text:list-item>
          <text:p text:style-name="P39">Balconies and windows facing sunlight work best </text:p>
        </text:list-item>
        <text:list-item>
          <text:p text:style-name="P40">Indoor plants may need artificial grow lights </text:p>
        </text:list-item>
      </text:list>
      <text:p text:style-name="P35"/>
      <text:h text:style-name="P36" text:outline-level="2"><text:span text:style-name="Strong_20_Emphasis">3. Use the Right Containers</text:span></text:h>
      <text:p text:style-name="Text_20_body">Containers are essential in urban gardening.</text:p>
      <text:list text:style-name="L21">
        <text:list-item>
          <text:p text:style-name="P41">Make sure pots have <text:span text:style-name="Strong_20_Emphasis">drainage holes</text:span> </text:p>
        </text:list-item>
        <text:list-item>
          <text:p text:style-name="P41">Use containers that match plant size </text:p>
        </text:list-item>
        <text:list-item>
          <text:p text:style-name="P42">Reuse bottles, buckets, or boxes for low-cost gardening </text:p>
        </text:list-item>
      </text:list>
      <text:p text:style-name="P35"/>
      <text:h text:style-name="P36" text:outline-level="2"><text:span text:style-name="Strong_20_Emphasis">4. Water Smartly 💧</text:span></text:h>
      <text:p text:style-name="Text_20_body">Overwatering is one of the most common mistakes.</text:p>
      <text:list text:style-name="L22">
        <text:list-item>
          <text:p text:style-name="P43">Water only when the soil feels dry </text:p>
        </text:list-item>
        <text:list-item>
          <text:p text:style-name="P43">Avoid watering leaves too much </text:p>
        </text:list-item>
        <text:list-item>
          <text:p text:style-name="P44">Ensure excess water can drain out </text:p>
        </text:list-item>
      </text:list>
      <text:p text:style-name="P35"/>
      <text:h text:style-name="P36" text:outline-level="2"><text:span text:style-name="Strong_20_Emphasis">5. Use Good Soil or Growing Medium</text:span></text:h>
      <text:p text:style-name="Text_20_body">Healthy plants need good nutrition.</text:p>
      <text:list text:style-name="L23">
        <text:list-item>
          <text:p text:style-name="P45">Use <text:span text:style-name="Strong_20_Emphasis">organic compost</text:span> for better growth </text:p>
        </text:list-item>
        <text:list-item>
          <text:p text:style-name="P45">For advanced setups, try <text:span text:style-name="Strong_20_Emphasis">soilless methods</text:span> like coco peat </text:p>
        </text:list-item>
        <text:list-item>
          <text:p text:style-name="P46">Avoid poor-quality soil </text:p>
        </text:list-item>
      </text:list>
      <text:p text:style-name="P35"/>
      <text:h text:style-name="P36" text:outline-level="2"><text:span text:style-name="Strong_20_Emphasis">6. Start with Basic Tools</text:span></text:h>
      <text:p text:style-name="Text_20_body">You don’t need expensive technology at the beginning.</text:p>
      <text:p text:style-name="Text_20_body">Start with:</text:p>
      <text:list text:style-name="L24">
        <text:list-item>
          <text:p text:style-name="P47">Watering can </text:p>
        </text:list-item>
        <text:list-item>
          <text:p text:style-name="P47">Small shovel </text:p>
        </text:list-item>
        <text:list-item>
          <text:p text:style-name="P47">Spray bottle </text:p>
        </text:list-item>
        <text:list-item>
          <text:p text:style-name="P48">Basic fertilizer </text:p>
        </text:list-item>
      </text:list>
      <text:p text:style-name="Text_20_body">You can upgrade to smart gardening tools later.</text:p>
      <text:p text:style-name="P35"/>
      <text:h text:style-name="P36" text:outline-level="2"><text:soft-page-break/><text:span text:style-name="Strong_20_Emphasis">7. Be Patient and Observe</text:span></text:h>
      <text:p text:style-name="Text_20_body">Gardening is a slow process.</text:p>
      <text:list text:style-name="L25">
        <text:list-item>
          <text:p text:style-name="P49">Plants take time to grow </text:p>
        </text:list-item>
        <text:list-item>
          <text:p text:style-name="P49">Observe changes in leaves and soil </text:p>
        </text:list-item>
        <text:list-item>
          <text:p text:style-name="P50">Learn from small mistakes </text:p>
        </text:list-item>
      </text:list>
      <text:p text:style-name="P35"/>
      <text:h text:style-name="P36" text:outline-level="2"><text:span text:style-name="Strong_20_Emphasis"><text:span text:style-name="T12">8. Common Mistakes to Avoid</text:span></text:span></text:h>
      <text:list text:style-name="L26">
        <text:list-item>
          <text:p text:style-name="P51">Overwatering plants </text:p>
        </text:list-item>
        <text:list-item>
          <text:p text:style-name="P51">Ignoring sunlight needs </text:p>
        </text:list-item>
        <text:list-item>
          <text:p text:style-name="P51">Planting too many crops at once </text:p>
        </text:list-item>
        <text:list-item>
          <text:p text:style-name="P51">Not checking for pests </text:p>
        </text:list-item>
        <text:list-item>
          <text:p text:style-name="P52">Expecting fast results </text:p>
        </text:list-item>
      </text:list>
      <text:p text:style-name="P35"/>
      <text:h text:style-name="P36" text:outline-level="2"><text:span text:style-name="Strong_20_Emphasis"><text:span text:style-name="T17">Conclusion</text:span></text:span></text:h>
      <text:p text:style-name="Text_20_body">Urban gardening is a rewarding and relaxing activity that anyone can start, even with limited space. By following simple tips and avoiding common mistakes, beginners can successfully grow their own plants at home.</text:p>
      <text:p text:style-name="Text_20_body">Start small, stay consistent, and enjoy the process—your small garden can grow into something amazing over time</text:p>
      <text:p text:style-name="P53"><text:span text:style-name="T20">4.</text:span><text:span text:style-name="T21">Do’s and Don’ts in Urban Gardening</text:span> </text:p>
      <text:h text:style-name="Heading_20_2" text:outline-level="2"><text:span text:style-name="Strong_20_Emphasis"><text:span text:style-name="T12">Introduction</text:span></text:span></text:h>
      <text:p text:style-name="Text_20_body">Urban gardening is a great way to grow fresh food in limited spaces like balconies, rooftops, or indoor corners. However, success depends on following the right practices and avoiding common mistakes.</text:p>
      <text:p text:style-name="Text_20_body">This guide will help you understand what to do—and what to avoid—for a healthy and productive urban garden.</text:p>
      <text:p text:style-name="P35"/>
      <text:h text:style-name="P36" text:outline-level="2">✅ <text:span text:style-name="Strong_20_Emphasis">Do’s in Urban Gardening</text:span></text:h>
      <text:h text:style-name="P34" text:outline-level="3"><text:span text:style-name="Strong_20_Emphasis">1. Use Space Smartly</text:span></text:h>
      <text:list text:style-name="L27">
        <text:list-item>
          <text:p text:style-name="P54">Use vertical shelves, hanging pots, and wall planters </text:p>
        </text:list-item>
        <text:list-item>
          <text:p text:style-name="P55">Maximize small areas efficiently </text:p>
        </text:list-item>
      </text:list>
      <text:h text:style-name="P34" text:outline-level="3"><text:span text:style-name="Strong_20_Emphasis">2. Choose the Right Plants</text:span></text:h>
      <text:list text:style-name="L28">
        <text:list-item>
          <text:p text:style-name="P56">Start with easy crops like herbs and leafy greens </text:p>
        </text:list-item>
        <text:list-item>
          <text:p text:style-name="P57">Select plants based on sunlight availability </text:p>
        </text:list-item>
      </text:list>
      <text:h text:style-name="P34" text:outline-level="3"><text:span text:style-name="Strong_20_Emphasis"/></text:h>
      <text:h text:style-name="P34" text:outline-level="3"><text:soft-page-break/><text:span text:style-name="Strong_20_Emphasis">4. Maintain Soil Health</text:span></text:h>
      <text:list text:style-name="L29">
        <text:list-item>
          <text:p text:style-name="P58">Use organic compost </text:p>
        </text:list-item>
        <text:list-item>
          <text:p text:style-name="P59">Refresh soil regularly </text:p>
        </text:list-item>
      </text:list>
      <text:h text:style-name="P34" text:outline-level="3"><text:span text:style-name="Strong_20_Emphasis">5. Water Wisely</text:span></text:h>
      <text:list text:style-name="L30">
        <text:list-item>
          <text:p text:style-name="P60">Water only when soil is dry </text:p>
        </text:list-item>
        <text:list-item>
          <text:p text:style-name="P61">Use drip irrigation or watering cans </text:p>
        </text:list-item>
      </text:list>
      <text:h text:style-name="P34" text:outline-level="3"><text:span text:style-name="Strong_20_Emphasis">6. Monitor Plant Health</text:span></text:h>
      <text:list text:style-name="L31">
        <text:list-item>
          <text:p text:style-name="P62">Check leaves for pests or disease </text:p>
        </text:list-item>
        <text:list-item>
          <text:p text:style-name="P63">Act early if problems appear </text:p>
        </text:list-item>
      </text:list>
      <text:p text:style-name="P35"/>
      <text:h text:style-name="P36" text:outline-level="2">❌ <text:span text:style-name="Strong_20_Emphasis">Don’ts in Urban Gardening</text:span></text:h>
      <text:h text:style-name="P34" text:outline-level="3"><text:span text:style-name="Strong_20_Emphasis">1. Don’t Overcrowd Plants</text:span></text:h>
      <text:list text:style-name="L32">
        <text:list-item>
          <text:p text:style-name="P64">Plants need space to grow </text:p>
        </text:list-item>
        <text:list-item>
          <text:p text:style-name="P65">Overcrowding reduces yield and increases disease risk </text:p>
        </text:list-item>
      </text:list>
      <text:h text:style-name="P34" text:outline-level="3"><text:span text:style-name="Strong_20_Emphasis">2. Don’t Overwater</text:span></text:h>
      <text:list text:style-name="L33">
        <text:list-item>
          <text:p text:style-name="P66">Too much water can rot roots </text:p>
        </text:list-item>
        <text:list-item>
          <text:p text:style-name="P67">Always check soil moisture first </text:p>
        </text:list-item>
      </text:list>
      <text:h text:style-name="P34" text:outline-level="3"><text:span text:style-name="Strong_20_Emphasis">3. Don’t Ignore Sunlight Needs</text:span></text:h>
      <text:list text:style-name="L34">
        <text:list-item>
          <text:p text:style-name="P68">Not all plants grow indoors </text:p>
        </text:list-item>
        <text:list-item>
          <text:p text:style-name="P69">Lack of light leads to weak plants </text:p>
        </text:list-item>
      </text:list>
      <text:h text:style-name="P34" text:outline-level="3"><text:span text:style-name="Strong_20_Emphasis">4. Don’t Skip Maintenance</text:span></text:h>
      <text:list text:style-name="L35">
        <text:list-item>
          <text:p text:style-name="P70">Regular pruning is important </text:p>
        </text:list-item>
        <text:list-item>
          <text:p text:style-name="P71">Clean containers and tools </text:p>
        </text:list-item>
      </text:list>
      <text:h text:style-name="P34" text:outline-level="3"><text:span text:style-name="Strong_20_Emphasis">5. Don’t Rely Only on Technology</text:span></text:h>
      <text:list text:style-name="L36">
        <text:list-item>
          <text:p text:style-name="P72">Smart tools help, but observation is still important </text:p>
        </text:list-item>
        <text:list-item>
          <text:p text:style-name="P73">Gardening needs human attention </text:p>
        </text:list-item>
      </text:list>
      <text:p text:style-name="P35"/>
      <text:h text:style-name="P36" text:outline-level="2"><text:span text:style-name="Strong_20_Emphasis">Conclusion</text:span></text:h>
      <text:p text:style-name="Text_20_body">Urban gardening can be highly rewarding when done correctly. By following simple do’s and avoiding common mistakes, you can maintain a healthy and productive garden even in small urban spaces.</text:p>
      <text:p text:style-name="Text_20_body">Consistency, care, and observation are the real keys to success.</text:p>
      <text:p text:style-name="Text_20_body"/>
      <text:p text:style-name="Text_20_body"/>
      <text:p text:style-name="Standard"><text:soft-page-break/></text:p>
      <text:p text:style-name="Standard"/>
      <text:p text:style-name="P74"><text:s/><text:span text:style-name="T19">News &amp; Updates</text:span></text:p>
      <text:p text:style-name="P75">Climate change</text:p>
      <text:p text:style-name="P75">Eco-friendly trends</text:p>
      <text:p text:style-name="P75"/>
      <text:list text:style-name="L37">
        <text:list-item>
          <text:p text:style-name="P76"><text:span text:style-name="Strong_20_Emphasis"><text:span text:style-name="T22">Homepage Blog Preview</text:span></text:span></text:p>
        </text:list-item>
      </text:list>
      <text:p text:style-name="Text_20_body"><text:span text:style-name="Strong_20_Emphasis"><text:span text:style-name="T22">Title:</text:span></text:span><text:span text:style-name="T22"><text:line-break/></text:span><text:span text:style-name="Strong_20_Emphasis"><text:span text:style-name="T22">How Technology is Transforming Urban Gardening</text:span></text:span></text:p>
      <text:p text:style-name="Text_20_body"><text:span text:style-name="Strong_20_Emphasis"><text:span text:style-name="T22">Preview:</text:span></text:span><text:span text:style-name="T22"><text:line-break/>Discover how smart technology is revolutionizing urban gardening. From vertical farming to IoT-powered systems, learn how to grow fresh, sustainable food in small city spaces—efficiently and year-round.</text:span></text:p>
      <text:p text:style-name="Text_20_body"><text:span text:style-name="T22">👉 </text:span><text:span text:style-name="Emphasis"><text:span text:style-name="T22">Read More</text:span></text:span></text:p>
      <text:h text:style-name="Heading_20_1" text:outline-level="1"><text:span text:style-name="Strong_20_Emphasis"><text:span text:style-name="T22">Homepage Blog Preview (Second Blog)</text:span></text:span></text:h>
      <text:p text:style-name="P77"><text:span text:style-name="Strong_20_Emphasis">Title:</text:span><text:line-break/><text:span text:style-name="Strong_20_Emphasis">Beginner Tips and Tricks for Urban Gardening</text:span></text:p>
      <text:p text:style-name="P77"><text:span text:style-name="Strong_20_Emphasis">Preview:</text:span><text:line-break/>New to urban gardening? Learn simple tips and tricks to grow healthy plants in small spaces. From choosing the right plants to avoiding common mistakes, this beginner-friendly guide will help you start with confidence.</text:p>
      <text:p text:style-name="P77">👉 <text:span text:style-name="Emphasis">Read More</text:span></text:p>
      <text:h text:style-name="P78" text:outline-level="1"><text:span text:style-name="Strong_20_Emphasis">Homepage Blog Preview (Third Blog)</text:span></text:h>
      <text:p text:style-name="P77"><text:span text:style-name="Strong_20_Emphasis">Title:</text:span><text:line-break/><text:span text:style-name="Strong_20_Emphasis">How Technology Boosts Sustainable Gardening</text:span></text:p>
      <text:p text:style-name="P77"><text:soft-page-break/><text:span text:style-name="Strong_20_Emphasis">Preview:</text:span><text:line-break/>Explore how modern technology is making gardening more sustainable. From smart irrigation to AI-powered systems, discover how to grow more while using fewer resources and protecting the environment.</text:p>
      <text:p text:style-name="P77">👉 <text:span text:style-name="Emphasis">Read More</text:span></text:p>
      <text:h text:style-name="P78" text:outline-level="1"><text:span text:style-name="Strong_20_Emphasis">Blog 4: Do’s and Don’ts in Urban Gardening</text:span></text:h>
      <text:h text:style-name="P79" text:outline-level="2"><text:span text:style-name="Strong_20_Emphasis">Homepage Blog Preview</text:span></text:h>
      <text:p text:style-name="P77"><text:span text:style-name="Strong_20_Emphasis">Title:</text:span><text:line-break/><text:span text:style-name="Strong_20_Emphasis">Do’s and Don’ts in Urban Gardening</text:span></text:p>
      <text:p text:style-name="P77"><text:span text:style-name="Strong_20_Emphasis">Preview:</text:span><text:line-break/>Avoid common mistakes and grow smarter in small spaces. Learn the essential do’s and don’ts of urban gardening to keep your plants healthy, productive, and thriving in city environments.</text:p>
      <text:p text:style-name="P77">👉 <text:span text:style-name="Emphasis">Read More</text:span></text:p>
      <text:p text:style-name="P80"/>
      <text:p text:style-name="P80"/>
      <text:p text:style-name="P80"/>
      <text:p text:style-name="P80"/>
      <text:p text:style-name="P80"/>
      <text:p text:style-name="P80"/>
      <text:p text:style-name="P80">&lt;!DOCTYPE html&gt;</text:p>
      <text:p text:style-name="P80">&lt;html lang="en"&gt;</text:p>
      <text:p text:style-name="P80">&lt;head&gt;</text:p>
      <text:p text:style-name="P80">&lt;meta charset="UTF-8"&gt;</text:p>
      <text:p text:style-name="P80"><text:soft-page-break/>&lt;title&gt;Urban Gardening Blog&lt;/title&gt;</text:p>
      <text:p text:style-name="P80">&lt;link rel="stylesheet" href="style.css"&gt;</text:p>
      <text:p text:style-name="P80">&lt;/head&gt;</text:p>
      <text:p text:style-name="P80"/>
      <text:p text:style-name="P80">&lt;body&gt;</text:p>
      <text:p text:style-name="P80"/>
      <text:p text:style-name="P80">&lt;header&gt;</text:p>
      <text:p text:style-name="P80"><text:s text:c="2"/>&lt;h1&gt;🌱 Urban Gardening Blog&lt;/h1&gt;</text:p>
      <text:p text:style-name="P80"><text:s text:c="2"/>&lt;nav&gt;</text:p>
      <text:p text:style-name="P80"><text:s text:c="4"/>&lt;a href="index.html"&gt;Home&lt;/a&gt;</text:p>
      <text:p text:style-name="P80"><text:s text:c="4"/>&lt;a href="blog1.html"&gt;Technology&lt;/a&gt;</text:p>
      <text:p text:style-name="P80"><text:s text:c="4"/>&lt;a href="blog2.html"&gt;Beginner Tips&lt;/a&gt;</text:p>
      <text:p text:style-name="P80"><text:s text:c="4"/>&lt;a href="blog3.html"&gt;Sustainability&lt;/a&gt;</text:p>
      <text:p text:style-name="P80"><text:s text:c="4"/>&lt;a href="blog4.html"&gt;Do’s &amp; Don’ts&lt;/a&gt;</text:p>
      <text:p text:style-name="P80"><text:s text:c="2"/>&lt;/nav&gt;</text:p>
      <text:p text:style-name="P80">&lt;/header&gt;</text:p>
      <text:p text:style-name="P80"/>
      <text:p text:style-name="P80">&lt;section class="hero"&gt;</text:p>
      <text:p text:style-name="P80"><text:s text:c="2"/>&lt;h2&gt;Grow Smart. Live Green. 🌿&lt;/h2&gt;</text:p>
      <text:p text:style-name="P80"><text:s text:c="2"/>&lt;p&gt;Learn urban gardening with technology, sustainability, and simple tips.&lt;/p&gt;</text:p>
      <text:p text:style-name="P80">&lt;/section&gt;</text:p>
      <text:p text:style-name="P80"/>
      <text:p text:style-name="P80">&lt;section class="blogs"&gt;</text:p>
      <text:p text:style-name="P80"/>
      <text:p text:style-name="P80"><text:s text:c="2"/>&lt;div class="card"&gt;</text:p>
      <text:p text:style-name="P80"><text:s text:c="4"/>&lt;h3&gt;Technology in Urban Gardening&lt;/h3&gt;</text:p>
      <text:p text:style-name="P80"><text:s text:c="4"/>&lt;p&gt;Discover how smart farming and IoT are changing urban gardening.&lt;/p&gt;</text:p>
      <text:p text:style-name="P80"><text:s text:c="4"/>&lt;a href="blog1.html"&gt;Read More&lt;/a&gt;</text:p>
      <text:p text:style-name="P80"><text:s text:c="2"/>&lt;/div&gt;</text:p>
      <text:p text:style-name="P80"><text:soft-page-break/></text:p>
      <text:p text:style-name="P80"><text:s text:c="2"/>&lt;div class="card"&gt;</text:p>
      <text:p text:style-name="P80"><text:s text:c="4"/>&lt;h3&gt;Beginner Tips and Tricks&lt;/h3&gt;</text:p>
      <text:p text:style-name="P80"><text:s text:c="4"/>&lt;p&gt;Start your gardening journey with simple and effective tips.&lt;/p&gt;</text:p>
      <text:p text:style-name="P80"><text:s text:c="4"/>&lt;a href="blog2.html"&gt;Read More&lt;/a&gt;</text:p>
      <text:p text:style-name="P80"><text:s text:c="2"/>&lt;/div&gt;</text:p>
      <text:p text:style-name="P80"/>
      <text:p text:style-name="P80"><text:s text:c="2"/>&lt;div class="card"&gt;</text:p>
      <text:p text:style-name="P80"><text:s text:c="4"/>&lt;h3&gt;How Tech Boosts Sustainability&lt;/h3&gt;</text:p>
      <text:p text:style-name="P80"><text:s text:c="4"/>&lt;p&gt;Learn how technology saves water and improves eco-friendly gardening.&lt;/p&gt;</text:p>
      <text:p text:style-name="P80"><text:s text:c="4"/>&lt;a href="blog3.html"&gt;Read More&lt;/a&gt;</text:p>
      <text:p text:style-name="P80"><text:s text:c="2"/>&lt;/div&gt;</text:p>
      <text:p text:style-name="P80"/>
      <text:p text:style-name="P80"><text:s text:c="2"/>&lt;div class="card"&gt;</text:p>
      <text:p text:style-name="P80"><text:s text:c="4"/>&lt;h3&gt;Do’s and Don’ts&lt;/h3&gt;</text:p>
      <text:p text:style-name="P80"><text:s text:c="4"/>&lt;p&gt;Avoid mistakes and grow healthy plants in small spaces.&lt;/p&gt;</text:p>
      <text:p text:style-name="P80"><text:s text:c="4"/>&lt;a href="blog4.html"&gt;Read More&lt;/a&gt;</text:p>
      <text:p text:style-name="P80"><text:s text:c="2"/>&lt;/div&gt;</text:p>
      <text:p text:style-name="P80"/>
      <text:p text:style-name="P80">&lt;/section&gt;</text:p>
      <text:p text:style-name="P80"/>
      <text:p text:style-name="P80">&lt;script src="script.js"&gt;&lt;/script&gt;</text:p>
      <text:p text:style-name="P80">&lt;/body&gt;</text:p>
      <text:p text:style-name="P80">&lt;/html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3T20:05:19.265838600</meta:creation-date>
    <meta:editing-duration>PT33M58S</meta:editing-duration>
    <meta:editing-cycles>3</meta:editing-cycles>
    <meta:generator>LibreOffice/26.2.2.2$Windows_X86_64 LibreOffice_project/1f77d10d6938fd34972958f64b2bcfa54f8b1ba5</meta:generator>
    <dc:date>2026-04-24T14:06:45.808508200</dc:date>
    <meta:document-statistic meta:table-count="0" meta:image-count="0" meta:object-count="0" meta:page-count="10" meta:paragraph-count="225" meta:word-count="1687" meta:character-count="11059" meta:non-whitespace-character-count="9506"/>
  </office:meta>
</office:document-meta>
</file>